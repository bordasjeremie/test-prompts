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Bahnschrift" svg:font-family="Bahnschrift" style:font-family-generic="swiss" style:font-pitch="variable"/>
    <style:font-face style:name="Bahnschrift Condensed" svg:font-family="'Bahnschrift Condensed'" style:font-family-generic="swiss" style:font-pitch="variable"/>
    <style:font-face style:name="Bahnschrift Light" svg:font-family="'Bahnschrift Light'" style:font-family-generic="swiss" style:font-pitch="variable"/>
    <style:font-face style:name="Bahnschrift SemiBold" svg:font-family="'Bahnschrift SemiBold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style:font-name="Bahnschrift Light" fo:font-size="6pt" style:font-size-asian="6pt" style:font-size-complex="6pt"/>
    </style:style>
    <style:style style:name="P2" style:family="paragraph" style:parent-style-name="Heading_20_2">
      <style:text-properties style:font-name="Arial" fo:font-size="8pt" style:font-size-asian="8pt" style:font-size-complex="8pt"/>
    </style:style>
    <style:style style:name="P3" style:family="paragraph" style:parent-style-name="Heading_20_2">
      <style:text-properties style:font-name="Bahnschrift Light" fo:font-size="6pt" style:font-size-asian="6pt" style:font-size-complex="6pt"/>
    </style:style>
    <style:style style:name="P4" style:family="paragraph" style:parent-style-name="Heading_20_3">
      <style:text-properties style:font-name="Arial Black1" fo:font-size="8pt" style:font-size-asian="8pt" style:font-size-complex="8pt"/>
    </style:style>
    <style:style style:name="P5" style:family="paragraph" style:parent-style-name="Heading_20_3">
      <style:text-properties style:font-name="Bahnschrift Light" fo:font-size="8pt" style:font-size-asian="8pt" style:font-size-complex="8pt"/>
    </style:style>
    <style:style style:name="P6" style:family="paragraph" style:parent-style-name="Heading_20_3">
      <style:text-properties style:font-name="Bahnschrift Light" fo:font-size="6pt" style:font-size-asian="6pt" style:font-size-complex="6pt"/>
    </style:style>
    <style:style style:name="P7" style:family="paragraph" style:parent-style-name="Text_20_body">
      <style:text-properties style:font-name="Bahnschrift Light" fo:font-size="8pt" style:font-size-asian="8pt" style:font-size-complex="8pt"/>
    </style:style>
    <style:style style:name="P8" style:family="paragraph" style:parent-style-name="Text_20_body">
      <style:text-properties style:font-name="Bahnschrift Light" fo:font-size="6pt" style:font-size-asian="6pt" style:font-size-complex="6pt"/>
    </style:style>
    <style:style style:name="P9" style:family="paragraph" style:parent-style-name="Text_20_body" style:list-style-name="L59">
      <style:text-properties style:font-name="Bahnschrift Light" fo:font-size="6pt" style:font-size-asian="6pt" style:font-size-complex="6pt"/>
    </style:style>
    <style:style style:name="P10" style:family="paragraph" style:parent-style-name="Text_20_body" style:list-style-name="L60">
      <style:text-properties style:font-name="Bahnschrift Light" fo:font-size="6pt" style:font-size-asian="6pt" style:font-size-complex="6pt"/>
    </style:style>
    <style:style style:name="P11" style:family="paragraph" style:parent-style-name="Text_20_body" style:list-style-name="L61">
      <style:text-properties style:font-name="Bahnschrift Light" fo:font-size="6pt" style:font-size-asian="6pt" style:font-size-complex="6pt"/>
    </style:style>
    <style:style style:name="P12" style:family="paragraph" style:parent-style-name="Text_20_body" style:list-style-name="L62">
      <style:text-properties style:font-name="Bahnschrift Light" fo:font-size="6pt" style:font-size-asian="6pt" style:font-size-complex="6pt"/>
    </style:style>
    <style:style style:name="P13" style:family="paragraph" style:parent-style-name="Text_20_body" style:list-style-name="L63">
      <style:text-properties style:font-name="Bahnschrift Light" fo:font-size="6pt" style:font-size-asian="6pt" style:font-size-complex="6pt"/>
    </style:style>
    <style:style style:name="P14" style:family="paragraph" style:parent-style-name="Text_20_body" style:list-style-name="L64">
      <style:text-properties style:font-name="Bahnschrift Light" fo:font-size="6pt" style:font-size-asian="6pt" style:font-size-complex="6pt"/>
    </style:style>
    <style:style style:name="P15" style:family="paragraph" style:parent-style-name="Text_20_body" style:list-style-name="L65">
      <style:text-properties style:font-name="Bahnschrift Light" fo:font-size="6pt" style:font-size-asian="6pt" style:font-size-complex="6pt"/>
    </style:style>
    <style:style style:name="P16" style:family="paragraph" style:parent-style-name="Text_20_body" style:list-style-name="L66">
      <style:text-properties style:font-name="Bahnschrift Light" fo:font-size="6pt" style:font-size-asian="6pt" style:font-size-complex="6pt"/>
    </style:style>
    <style:style style:name="P17" style:family="paragraph" style:parent-style-name="Text_20_body" style:list-style-name="L67">
      <style:text-properties style:font-name="Bahnschrift Light" fo:font-size="6pt" style:font-size-asian="6pt" style:font-size-complex="6pt"/>
    </style:style>
    <style:style style:name="P18" style:family="paragraph" style:parent-style-name="Text_20_body" style:list-style-name="L68">
      <style:text-properties style:font-name="Bahnschrift Light" fo:font-size="6pt" style:font-size-asian="6pt" style:font-size-complex="6pt"/>
    </style:style>
    <style:style style:name="P19" style:family="paragraph" style:parent-style-name="Text_20_body" style:list-style-name="L69">
      <style:text-properties style:font-name="Bahnschrift Light" fo:font-size="6pt" style:font-size-asian="6pt" style:font-size-complex="6pt"/>
    </style:style>
    <style:style style:name="P20" style:family="paragraph" style:parent-style-name="Text_20_body" style:list-style-name="L70">
      <style:text-properties style:font-name="Bahnschrift Light" fo:font-size="6pt" style:font-size-asian="6pt" style:font-size-complex="6pt"/>
    </style:style>
    <style:style style:name="P21" style:family="paragraph" style:parent-style-name="Text_20_body" style:list-style-name="L71">
      <style:text-properties style:font-name="Bahnschrift Light" fo:font-size="6pt" style:font-size-asian="6pt" style:font-size-complex="6pt"/>
    </style:style>
    <style:style style:name="P22" style:family="paragraph" style:parent-style-name="Text_20_body" style:list-style-name="L72">
      <style:text-properties style:font-name="Bahnschrift Light" fo:font-size="6pt" style:font-size-asian="6pt" style:font-size-complex="6pt"/>
    </style:style>
    <style:style style:name="P23" style:family="paragraph" style:parent-style-name="Text_20_body" style:list-style-name="L73">
      <style:text-properties style:font-name="Bahnschrift Light" fo:font-size="6pt" style:font-size-asian="6pt" style:font-size-complex="6pt"/>
    </style:style>
    <style:style style:name="P24" style:family="paragraph" style:parent-style-name="Text_20_body" style:list-style-name="L74">
      <style:text-properties style:font-name="Bahnschrift Light" fo:font-size="6pt" style:font-size-asian="6pt" style:font-size-complex="6pt"/>
    </style:style>
    <style:style style:name="P25" style:family="paragraph" style:parent-style-name="Text_20_body" style:list-style-name="L75">
      <style:text-properties style:font-name="Bahnschrift Light" fo:font-size="6pt" style:font-size-asian="6pt" style:font-size-complex="6pt"/>
    </style:style>
    <style:style style:name="P26" style:family="paragraph" style:parent-style-name="Text_20_body" style:list-style-name="L76">
      <style:text-properties style:font-name="Bahnschrift Light" fo:font-size="6pt" style:font-size-asian="6pt" style:font-size-complex="6pt"/>
    </style:style>
    <style:style style:name="P27" style:family="paragraph" style:parent-style-name="Text_20_body" style:list-style-name="L77">
      <style:text-properties style:font-name="Bahnschrift Light" fo:font-size="6pt" style:font-size-asian="6pt" style:font-size-complex="6pt"/>
    </style:style>
    <style:style style:name="P28" style:family="paragraph" style:parent-style-name="Text_20_body" style:list-style-name="L78">
      <style:text-properties style:font-name="Bahnschrift Light" fo:font-size="6pt" style:font-size-asian="6pt" style:font-size-complex="6pt"/>
    </style:style>
    <style:style style:name="P29" style:family="paragraph" style:parent-style-name="Text_20_body" style:list-style-name="L79">
      <style:text-properties style:font-name="Bahnschrift Light" fo:font-size="6pt" style:font-size-asian="6pt" style:font-size-complex="6pt"/>
    </style:style>
    <style:style style:name="P30" style:family="paragraph" style:parent-style-name="Text_20_body" style:list-style-name="L47">
      <style:text-properties style:font-name="Bahnschrift Light" fo:font-size="6pt" style:font-size-asian="6pt" style:font-size-complex="6pt"/>
    </style:style>
    <style:style style:name="P31" style:family="paragraph" style:parent-style-name="Text_20_body" style:list-style-name="L48">
      <style:text-properties style:font-name="Bahnschrift Light" fo:font-size="6pt" style:font-size-asian="6pt" style:font-size-complex="6pt"/>
    </style:style>
    <style:style style:name="P32" style:family="paragraph" style:parent-style-name="Text_20_body" style:list-style-name="L49">
      <style:text-properties style:font-name="Bahnschrift Light" fo:font-size="6pt" style:font-size-asian="6pt" style:font-size-complex="6pt"/>
    </style:style>
    <style:style style:name="P33" style:family="paragraph" style:parent-style-name="Text_20_body" style:list-style-name="L50">
      <style:text-properties style:font-name="Bahnschrift Light" fo:font-size="6pt" style:font-size-asian="6pt" style:font-size-complex="6pt"/>
    </style:style>
    <style:style style:name="P34" style:family="paragraph" style:parent-style-name="Text_20_body" style:list-style-name="L51">
      <style:text-properties style:font-name="Bahnschrift Light" fo:font-size="6pt" style:font-size-asian="6pt" style:font-size-complex="6pt"/>
    </style:style>
    <style:style style:name="P35" style:family="paragraph" style:parent-style-name="Text_20_body" style:list-style-name="L52">
      <style:text-properties style:font-name="Bahnschrift Light" fo:font-size="6pt" style:font-size-asian="6pt" style:font-size-complex="6pt"/>
    </style:style>
    <style:style style:name="P36" style:family="paragraph" style:parent-style-name="Text_20_body" style:list-style-name="L53">
      <style:text-properties style:font-name="Bahnschrift Light" fo:font-size="6pt" style:font-size-asian="6pt" style:font-size-complex="6pt"/>
    </style:style>
    <style:style style:name="P37" style:family="paragraph" style:parent-style-name="Text_20_body" style:list-style-name="L54">
      <style:text-properties style:font-name="Bahnschrift Light" fo:font-size="6pt" style:font-size-asian="6pt" style:font-size-complex="6pt"/>
    </style:style>
    <style:style style:name="P38" style:family="paragraph" style:parent-style-name="Text_20_body" style:list-style-name="L55">
      <style:text-properties style:font-name="Bahnschrift Light" fo:font-size="6pt" style:font-size-asian="6pt" style:font-size-complex="6pt"/>
    </style:style>
    <style:style style:name="P39" style:family="paragraph" style:parent-style-name="Text_20_body" style:list-style-name="L56">
      <style:text-properties style:font-name="Bahnschrift Light" fo:font-size="6pt" style:font-size-asian="6pt" style:font-size-complex="6pt"/>
    </style:style>
    <style:style style:name="P40" style:family="paragraph" style:parent-style-name="Text_20_body" style:list-style-name="L57">
      <style:text-properties style:font-name="Bahnschrift Light" fo:font-size="6pt" style:font-size-asian="6pt" style:font-size-complex="6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PROGRAMME 1 : DÉBUTER LE RUNNING (3 SEMAINES)</text:h>
      <text:h text:style-name="P6" text:outline-level="3">SEMAINE 1</text:h>
      <text:h text:style-name="P3" text:outline-level="2">S1 — Durée totale : 30 (mn)</text:h>
      <text:list xml:id="list7261064465827944910" text:style-name="L59">
        <text:list-item>
          <text:p text:style-name="P9">0 à 5 (mn) : marche (échauffement)</text:p>
        </text:list-item>
        <text:list-item>
          <text:p text:style-name="P9">5 à 25 (mn) : 10 répétitions (20 (mn) total) : 1 (mn) course EF / 1 (mn) marche</text:p>
        </text:list-item>
        <text:list-item>
          <text:p text:style-name="P9">25 à 30 (mn) : marche (retour au calme)</text:p>
        </text:list-item>
      </text:list>
      <text:h text:style-name="P3" text:outline-level="2">S2 — Durée totale : 34 (mn)</text:h>
      <text:list xml:id="list2168707900435177230" text:style-name="L60">
        <text:list-item>
          <text:p text:style-name="P10">0 à 5 (mn) : marche</text:p>
        </text:list-item>
        <text:list-item>
          <text:p text:style-name="P10">5 à 29 (mn) : 12 répétitions (24 (mn) total) :1 (mn) course EF / 1 (mn) marche</text:p>
        </text:list-item>
        <text:list-item>
          <text:p text:style-name="P10">29 à 34 (mn) : marche</text:p>
        </text:list-item>
      </text:list>
      <text:h text:style-name="P3" text:outline-level="2">S3 — Durée totale : 38 (mn)</text:h>
      <text:list xml:id="list6152773106105710009" text:style-name="L61">
        <text:list-item>
          <text:p text:style-name="P11">0 à 5 (mn) : marche</text:p>
        </text:list-item>
        <text:list-item>
          <text:p text:style-name="P11">5 à 33 (mn) : 14 répétitions (28 (mn) total) : 1 (mn) course EF / 1 (mn) marche</text:p>
        </text:list-item>
        <text:list-item>
          <text:p text:style-name="P11">33 à 38 (mn) : marche</text:p>
        </text:list-item>
      </text:list>
      <text:h text:style-name="P1" text:outline-level="1">SEMAINE 2</text:h>
      <text:h text:style-name="P1" text:outline-level="1">S1 — Durée totale : 34 (mn)</text:h>
      <text:list xml:id="list2428021951402043477" text:style-name="L62">
        <text:list-item>
          <text:p text:style-name="P12">0 à 5 (mn) : marche</text:p>
        </text:list-item>
        <text:list-item>
          <text:p text:style-name="P12">5 à 29 (mn) : 8 répétitions (24 (mn) total) : 2 (mn) course EF / 1 (mn) marche</text:p>
        </text:list-item>
        <text:list-item>
          <text:p text:style-name="P12">29 à 34 (mn) : marche</text:p>
        </text:list-item>
      </text:list>
      <text:h text:style-name="P3" text:outline-level="2">S2 — Durée totale : 37 (mn)</text:h>
      <text:list xml:id="list434316097122030675" text:style-name="L63">
        <text:list-item>
          <text:p text:style-name="P13">0 à 5 (mn) : marche</text:p>
        </text:list-item>
        <text:list-item>
          <text:p text:style-name="P13">5 à 32 (mn) : 9 répétitions (27 (mn) total) : 2 (mn) course EF / 1 (mn) marche</text:p>
        </text:list-item>
        <text:list-item>
          <text:p text:style-name="P13">32 à 37 (mn) : marche</text:p>
        </text:list-item>
      </text:list>
      <text:h text:style-name="P3" text:outline-level="2">S3 — Durée totale : 40 (mn)</text:h>
      <text:list xml:id="list4191836818131529142" text:style-name="L64">
        <text:list-item>
          <text:p text:style-name="P14">0 à 5 (mn) : marche</text:p>
        </text:list-item>
        <text:list-item>
          <text:p text:style-name="P14">5 à 35 (mn) : 10 répétitions (30 (mn) total) : 2 (mn) course EF / 1 (mn) marche</text:p>
        </text:list-item>
        <text:list-item>
          <text:p text:style-name="P14">35 à 40 (mn) : marche</text:p>
        </text:list-item>
      </text:list>
      <text:h text:style-name="P1" text:outline-level="1">SEMAINE 3</text:h>
      <text:h text:style-name="P3" text:outline-level="2">S1 — Durée totale : 38 (mn)</text:h>
      <text:list xml:id="list3673488719939719613" text:style-name="L65">
        <text:list-item>
          <text:p text:style-name="P15">0 à 5 (mn) : marche</text:p>
        </text:list-item>
        <text:list-item>
          <text:p text:style-name="P15">5 à 33 (mn) : 7 répétitions (28 (mn) total) : 3 (mn) course EF / 1 (mn) marche</text:p>
        </text:list-item>
        <text:list-item>
          <text:p text:style-name="P15">33 à 38 (mn) : marche</text:p>
        </text:list-item>
      </text:list>
      <text:h text:style-name="P3" text:outline-level="2">S2 — Durée totale : 41 (mn)</text:h>
      <text:list xml:id="list6983598138890469857" text:style-name="L66">
        <text:list-item>
          <text:p text:style-name="P16">0 à 5 (mn) : marche</text:p>
        </text:list-item>
        <text:list-item>
          <text:p text:style-name="P16">5 à 37 (mn) : 8 répétitions (32 (mn) total) : 3 (mn) course EF / 1 (mn) marche</text:p>
        </text:list-item>
        <text:list-item>
          <text:p text:style-name="P16">37 à 41 (mn) : marche</text:p>
        </text:list-item>
      </text:list>
      <text:h text:style-name="P3" text:outline-level="2">S3 — Durée totale : 33 (mn)</text:h>
      <text:list xml:id="list5789620289893725333" text:style-name="L67">
        <text:list-item>
          <text:p text:style-name="P17">0 à 5 (mn) : marche</text:p>
        </text:list-item>
        <text:list-item>
          <text:p text:style-name="P17">5 à 31 (mn) : 4 répétitions (26 (mn) total) : 5 (mn) course EF / 2 (mn) marche</text:p>
        </text:list-item>
        <text:list-item>
          <text:p text:style-name="P17">31 à 33 (mn) : marche (retour au calme court)</text:p>
        </text:list-item>
      </text:list>
      <text:p text:style-name="P8"/>
      <text:h text:style-name="P4" text:outline-level="3"><text:soft-page-break/>PROGRAMME 2 : REPRENDRE LE RUNNING APRÈS ARRET (3 SEMAINES)</text:h>
      <text:h text:style-name="P1" text:outline-level="1">Semaine 1</text:h>
      <text:h text:style-name="P3" text:outline-level="2">S1 — Durée totale : 40 (mn)</text:h>
      <text:list xml:id="list5997311968713252354" text:style-name="L68">
        <text:list-item>
          <text:p text:style-name="P18">0 à 40 (mn) : EF</text:p>
        </text:list-item>
      </text:list>
      <text:h text:style-name="P3" text:outline-level="2">S2 — Durée totale : 45 (mn)</text:h>
      <text:list xml:id="list2525487742585919833" text:style-name="L69">
        <text:list-item>
          <text:p text:style-name="P19">0 à 45 (mn) : EF</text:p>
        </text:list-item>
      </text:list>
      <text:h text:style-name="P3" text:outline-level="2">S3 — Durée totale : 40 (mn) (EF + accélérations)</text:h>
      <text:list xml:id="list1640749695031858473" text:style-name="L70">
        <text:list-item>
          <text:p text:style-name="P20">0 à 30 (mn) : EF</text:p>
        </text:list-item>
        <text:list-item>
          <text:p text:style-name="P20">30 à 36 (mn) : accélérations (6 (mn))</text:p>
          <text:list>
            <text:list-item>
              <text:p text:style-name="P20">6 répétitions : 15 (s) vite-relâché / 45 (s) facile</text:p>
            </text:list-item>
          </text:list>
        </text:list-item>
        <text:list-item>
          <text:p text:style-name="P20">36 à 40 (mn) : EF</text:p>
        </text:list-item>
      </text:list>
      <text:h text:style-name="P3" text:outline-level="2">S4 — Durée totale : 60 (mn)</text:h>
      <text:list xml:id="list481397108645076662" text:style-name="L71">
        <text:list-item>
          <text:p text:style-name="P21">0 à 60 (mn) : EF</text:p>
        </text:list-item>
      </text:list>
      <text:h text:style-name="P1" text:outline-level="1">Semaine 2</text:h>
      <text:h text:style-name="P3" text:outline-level="2">S1 — Durée totale : 45 (mn)</text:h>
      <text:list xml:id="list5304171080979514959" text:style-name="L72">
        <text:list-item>
          <text:p text:style-name="P22">0 à 45 (mn) : EF</text:p>
        </text:list-item>
      </text:list>
      <text:h text:style-name="P3" text:outline-level="2">S2 — Durée totale : 43 (mn) (tempo léger)</text:h>
      <text:list xml:id="list5594092109995836481" text:style-name="L73">
        <text:list-item>
          <text:p text:style-name="P23">0 à 12 (mn) : EF</text:p>
        </text:list-item>
        <text:list-item>
          <text:p text:style-name="P23">12 à 20 (mn) : TEMPO</text:p>
        </text:list-item>
        <text:list-item>
          <text:p text:style-name="P23">20 à 23 (mn) : EF</text:p>
        </text:list-item>
        <text:list-item>
          <text:p text:style-name="P23">23 à 31 (mn) : TEMPO</text:p>
        </text:list-item>
        <text:list-item>
          <text:p text:style-name="P23">31 à 43 (mn) : EF</text:p>
        </text:list-item>
      </text:list>
      <text:h text:style-name="P3" text:outline-level="2">S3 — Durée totale : 40 (mn) (EF + accélérations)</text:h>
      <text:list xml:id="list1842565938332796200" text:style-name="L74">
        <text:list-item>
          <text:p text:style-name="P24">0 à 30 (mn) : EF</text:p>
        </text:list-item>
        <text:list-item>
          <text:p text:style-name="P24">30 à 36 (mn) : accélérations (6 (mn))</text:p>
          <text:list>
            <text:list-item>
              <text:p text:style-name="P24">6 répétitions : 15 (s) vite-relâché / 45 (s) facile</text:p>
            </text:list-item>
          </text:list>
        </text:list-item>
        <text:list-item>
          <text:p text:style-name="P24">36 à 40 (mn) : EF</text:p>
        </text:list-item>
      </text:list>
      <text:h text:style-name="P3" text:outline-level="2">S4 — Durée totale : 70 (mn)</text:h>
      <text:list xml:id="list5438742246388104242" text:style-name="L75">
        <text:list-item>
          <text:p text:style-name="P25">0 à 70 (mn) : EF</text:p>
        </text:list-item>
      </text:list>
      <text:h text:style-name="P1" text:outline-level="1">Semaine 3</text:h>
      <text:h text:style-name="P3" text:outline-level="2">S1 — Durée totale : 45 (mn)</text:h>
      <text:list xml:id="list3002917957078005820" text:style-name="L76">
        <text:list-item>
          <text:p text:style-name="P26">0 à 45 (mn) : EF</text:p>
        </text:list-item>
      </text:list>
      <text:h text:style-name="P3" text:outline-level="2">S2 — Durée totale : 49 (mn) (intervalles contrôlés)</text:h>
      <text:list xml:id="list6900162985584940345" text:style-name="L77">
        <text:list-item>
          <text:p text:style-name="P27">0 à 12 (mn) : EF</text:p>
        </text:list-item>
        <text:list-item>
          <text:p text:style-name="P27">12 à 15 (mn) : progressifs (3 (mn))</text:p>
          <text:list>
            <text:list-item>
              <text:p text:style-name="P27">3 répétitions : 20 (s) progressif / 40 (s) facile</text:p>
            </text:list-item>
          </text:list>
        </text:list-item>
        <text:list-item>
          <text:p text:style-name="P27">15 à 39 (mn) : intervalles (24 (mn))</text:p>
          <text:list>
            <text:list-item>
              <text:p text:style-name="P27">6 répétitions : 2 (mn) INTERVALLES / 2 (mn) EF</text:p>
            </text:list-item>
          </text:list>
        </text:list-item>
        <text:list-item>
          <text:p text:style-name="P27">39 à 49 (mn) : EF</text:p>
        </text:list-item>
      </text:list>
      <text:h text:style-name="P3" text:outline-level="2">S3 — Durée totale : 40 (mn)</text:h>
      <text:list xml:id="list7136968068494920784" text:style-name="L78">
        <text:list-item>
          <text:p text:style-name="P28">0 à 40 (mn) : EF</text:p>
        </text:list-item>
      </text:list>
      <text:h text:style-name="P4" text:outline-level="3"><text:soft-page-break/>PROGRAMME 3 : PREPARER UN 10K</text:h>
      <text:h text:style-name="P3" text:outline-level="2">S1 — Durée totale : 40 (mn)</text:h>
      <text:list xml:id="list4555608793905059040" text:style-name="L47">
        <text:list-item>
          <text:p text:style-name="P30">0 à 40 (mn) : EF</text:p>
        </text:list-item>
      </text:list>
      <text:h text:style-name="P3" text:outline-level="2">S2 — Durée totale : 41 (mn) (intervalles 1 (mn))</text:h>
      <text:list xml:id="list8932587072845368462" text:style-name="L48">
        <text:list-item>
          <text:p text:style-name="P31">0 à 12 (mn) : EF</text:p>
        </text:list-item>
        <text:list-item>
          <text:p text:style-name="P31">12 à 15 (mn) : progressifs (3 (mn) au total)</text:p>
          <text:list>
            <text:list-item>
              <text:p text:style-name="P31">3 répétitions : 20 (s) progressif / 40 (s) facile</text:p>
            </text:list-item>
          </text:list>
        </text:list-item>
        <text:list-item>
          <text:p text:style-name="P31">15 à 31 (mn) : intervalles (16 (mn) au total)</text:p>
          <text:list>
            <text:list-item>
              <text:p text:style-name="P31">8 répétitions : 1 (mn) INTERVALLES / 1 (mn) EF</text:p>
            </text:list-item>
          </text:list>
        </text:list-item>
        <text:list-item>
          <text:p text:style-name="P31">31 à 41 (mn) : EF</text:p>
        </text:list-item>
      </text:list>
      <text:h text:style-name="P3" text:outline-level="2">S3 — Durée totale : 41 (mn) (tempo en 2 blocs)</text:h>
      <text:list xml:id="list8536155865926062603" text:style-name="L49">
        <text:list-item>
          <text:p text:style-name="P32">0 à 12 (mn) : EF</text:p>
        </text:list-item>
        <text:list-item>
          <text:p text:style-name="P32">12 à 20 (mn) : TEMPO</text:p>
        </text:list-item>
        <text:list-item>
          <text:p text:style-name="P32">20 à 23 (mn) : EF</text:p>
        </text:list-item>
        <text:list-item>
          <text:p text:style-name="P32">23 à 31 (mn) : TEMPO</text:p>
        </text:list-item>
        <text:list-item>
          <text:p text:style-name="P32">31 à 41 (mn) : EF</text:p>
        </text:list-item>
      </text:list>
      <text:h text:style-name="P3" text:outline-level="2">S4 — Durée totale : 60 (mn)</text:h>
      <text:list xml:id="list8474029537500687429" text:style-name="L50">
        <text:list-item>
          <text:p text:style-name="P33">0 à 60 (mn) : EF</text:p>
        </text:list-item>
      </text:list>
      <text:h text:style-name="P1" text:outline-level="1">Semaine 2</text:h>
      <text:h text:style-name="P3" text:outline-level="2">S1 — Durée totale : 50 (mn) (EF + accélérations)</text:h>
      <text:list xml:id="list5153257917736562175" text:style-name="L51">
        <text:list-item>
          <text:p text:style-name="P34">0 à 40 (mn) : EF</text:p>
        </text:list-item>
        <text:list-item>
          <text:p text:style-name="P34">40 à 46 (mn) : accélérations (6 (mn) au total)</text:p>
          <text:list>
            <text:list-item>
              <text:p text:style-name="P34">6 répétitions : 15 (s) rapide-relâché / 45 (s) facile</text:p>
            </text:list-item>
          </text:list>
        </text:list-item>
        <text:list-item>
          <text:p text:style-name="P34">46 à 50 (mn) : EF</text:p>
        </text:list-item>
      </text:list>
      <text:h text:style-name="P3" text:outline-level="2">S2 — Durée totale : 49 (mn) (intervalles 2 (mn))</text:h>
      <text:list xml:id="list4666461961088974883" text:style-name="L52">
        <text:list-item>
          <text:p text:style-name="P35">0 à 12 (mn) : EF</text:p>
        </text:list-item>
        <text:list-item>
          <text:p text:style-name="P35">12 à 15 (mn) : progressifs</text:p>
          <text:list>
            <text:list-item>
              <text:p text:style-name="P35">3 répétitions : 20 (s) progressif / 40 (s) facile</text:p>
            </text:list-item>
          </text:list>
        </text:list-item>
        <text:list-item>
          <text:p text:style-name="P35">15 à 39 (mn) : intervalles (24 (mn) au total)</text:p>
          <text:list>
            <text:list-item>
              <text:p text:style-name="P35">6 répétitions : 2 (mn) INTERVALLES / 2 (mn) EF</text:p>
            </text:list-item>
          </text:list>
        </text:list-item>
        <text:list-item>
          <text:p text:style-name="P35">39 à 49 (mn) : EF</text:p>
        </text:list-item>
      </text:list>
      <text:h text:style-name="P3" text:outline-level="2">S3 — Durée totale : 42 (mn) (tempo continu)</text:h>
      <text:list xml:id="list3829404429419157789" text:style-name="L53">
        <text:list-item>
          <text:p text:style-name="P36">0 à 12 (mn) : EF</text:p>
        </text:list-item>
        <text:list-item>
          <text:p text:style-name="P36">12 à 32 (mn) : TEMPO</text:p>
        </text:list-item>
        <text:list-item>
          <text:p text:style-name="P36">32 à 42 (mn) : EF</text:p>
        </text:list-item>
      </text:list>
      <text:h text:style-name="P3" text:outline-level="2">S4 — Durée totale : 70 (mn) (fin un peu plus soutenue)</text:h>
      <text:list xml:id="list5233218161533920483" text:style-name="L54">
        <text:list-item>
          <text:p text:style-name="P37">0 à 60 (mn) : EF</text:p>
        </text:list-item>
        <text:list-item>
          <text:p text:style-name="P37">60 à 70 (mn) : EF “un peu plus soutenue” (contrôlé)</text:p>
        </text:list-item>
      </text:list>
      <text:h text:style-name="P1" text:outline-level="1">Semaine 3 (affûtage + course)</text:h>
      <text:h text:style-name="P3" text:outline-level="2">S1 — Durée totale : 45 (mn) (EF + accélérations)</text:h>
      <text:list xml:id="list9127735653718795909" text:style-name="L55">
        <text:list-item>
          <text:p text:style-name="P38">0 à 35 (mn) : EF</text:p>
        </text:list-item>
        <text:list-item>
          <text:p text:style-name="P38">35 à 41 (mn) : accélérations (6 (mn) au total)</text:p>
          <text:list>
            <text:list-item>
              <text:p text:style-name="P38">6 répétitions : 15 (s) rapide-relâché / 45 (s) facile</text:p>
            </text:list-item>
          </text:list>
        </text:list-item>
        <text:list-item>
          <text:p text:style-name="P38">41 à 45 (mn) : EF</text:p>
        </text:list-item>
      </text:list>
      <text:h text:style-name="P3" text:outline-level="2"><text:soft-page-break/>S2 — Durée totale : 40 (mn) (rappel vitesse court)</text:h>
      <text:list xml:id="list8763868961000379562" text:style-name="L56">
        <text:list-item>
          <text:p text:style-name="P39">0 à 12 (mn) : EF</text:p>
        </text:list-item>
        <text:list-item>
          <text:p text:style-name="P39">12 à 15 (mn) : progressifs</text:p>
          <text:list>
            <text:list-item>
              <text:p text:style-name="P39">3 répétitions : 20 (s) progressif / 40 (s) facile</text:p>
            </text:list-item>
          </text:list>
        </text:list-item>
        <text:list-item>
          <text:p text:style-name="P39">15 à 27 (mn) : intervalles courts (12 (mn) au total)</text:p>
          <text:list>
            <text:list-item>
              <text:p text:style-name="P39">6 répétitions : 1 (mn) INTERVALLES / 1 (mn) EF</text:p>
            </text:list-item>
          </text:list>
        </text:list-item>
        <text:list-item>
          <text:p text:style-name="P39">27 à 40 (mn) : EF</text:p>
        </text:list-item>
      </text:list>
      <text:h text:style-name="P3" text:outline-level="2">S3 — Durée totale : 35 (mn) (activation légère)</text:h>
      <text:list xml:id="list4029170243174995475" text:style-name="L57">
        <text:list-item>
          <text:p text:style-name="P40">0 à 25 (mn) : EF</text:p>
        </text:list-item>
        <text:list-item>
          <text:p text:style-name="P40">25 à 29 (mn) : accélérations (4 (mn) au total)</text:p>
          <text:list>
            <text:list-item>
              <text:p text:style-name="P40">4 répétitions : 15 (s) rapide-relâché / 45 (s) facile</text:p>
            </text:list-item>
          </text:list>
        </text:list-item>
        <text:list-item>
          <text:p text:style-name="P40">29 à 35 (mn) : EF</text:p>
        </text:list-item>
      </text:list>
      <text:h text:style-name="P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Bahnschrift" svg:font-family="Bahnschrift" style:font-family-generic="swiss" style:font-pitch="variable"/>
    <style:font-face style:name="Bahnschrift Condensed" svg:font-family="'Bahnschrift Condensed'" style:font-family-generic="swiss" style:font-pitch="variable"/>
    <style:font-face style:name="Bahnschrift Light" svg:font-family="'Bahnschrift Light'" style:font-family-generic="swiss" style:font-pitch="variable"/>
    <style:font-face style:name="Bahnschrift SemiBold" svg:font-family="'Bahnschrift SemiBold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3-05T14:36:38.72</meta:creation-date>
    <meta:document-statistic meta:table-count="0" meta:image-count="0" meta:object-count="0" meta:page-count="4" meta:paragraph-count="137" meta:word-count="1181" meta:character-count="4451"/>
    <dc:date>2026-03-05T15:53:31.17</dc:date>
    <meta:editing-duration>PT11M14S</meta:editing-duration>
    <meta:editing-cycles>1</meta:editing-cycles>
    <meta:generator>OpenOffice/4.1.15$Win32 OpenOffice.org_project/4115m2$Build-9813</meta:generator>
  </office:meta>
</office:document-meta>
</file>